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T9" style:parent-style-name="Standardskriftforavsnitt"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Standardskriftforavsnitt" style:family="text">
      <style:text-properties fo:color="#4472C4" fo:font-size="32pt" style:font-size-asian="32pt" style:font-size-complex="32pt"/>
    </style:style>
    <style:style style:name="P12" style:parent-style-name="Normal" style:family="paragraph">
      <style:paragraph-properties fo:text-align="end"/>
    </style:style>
    <style:style style:name="T13" style:parent-style-name="Standardskriftforavsnitt" style:family="text">
      <style:text-properties fo:color="#404040" fo:font-size="18pt" style:font-size-asian="18pt" style:font-size-complex="18pt"/>
    </style:style>
    <style:style style:name="P14" style:parent-style-name="Normal" style:family="paragraph">
      <style:paragraph-properties fo:break-before="page"/>
    </style:style>
    <style:style style:name="P15" style:parent-style-name="INNH1" style:family="paragraph">
      <style:paragraph-properties>
        <style:tab-stops>
          <style:tab-stop style:type="right" style:leader-style="dotted" style:leader-text="." style:position="6.293in"/>
        </style:tab-stops>
      </style:paragraph-properties>
    </style:style>
    <style:style style:name="P16" style:parent-style-name="INNH1" style:family="paragraph">
      <style:paragraph-properties>
        <style:tab-stops>
          <style:tab-stop style:type="right" style:leader-style="dotted" style:leader-text="." style:position="6.293in"/>
        </style:tab-stops>
      </style:paragraph-properties>
    </style:style>
    <style:style style:name="P17" style:parent-style-name="INNH1" style:family="paragraph">
      <style:paragraph-properties>
        <style:tab-stops>
          <style:tab-stop style:type="right" style:leader-style="dotted" style:leader-text="." style:position="6.293in"/>
        </style:tab-stops>
      </style:paragraph-properties>
    </style:style>
    <style:style style:name="P18" style:parent-style-name="INNH1" style:family="paragraph">
      <style:paragraph-properties>
        <style:tab-stops>
          <style:tab-stop style:type="right" style:leader-style="dotted" style:leader-text="." style:position="6.293in"/>
        </style:tab-stops>
      </style:paragraph-properties>
    </style:style>
    <style:style style:name="P19" style:parent-style-name="INNH1" style:family="paragraph">
      <style:paragraph-properties>
        <style:tab-stops>
          <style:tab-stop style:type="right" style:leader-style="dotted" style:leader-text="." style:position="6.293in"/>
        </style:tab-stops>
      </style:paragraph-properties>
    </style:style>
    <style:style style:name="T20" style:parent-style-name="Standardskriftforavsnitt" style:family="text">
      <style:text-properties fo:font-style="italic" style:font-style-asian="italic" style:font-style-complex="italic"/>
    </style:style>
    <style:style style:name="P21" style:parent-style-name="Listeavsnitt" style:family="paragraph"/>
    <style:style style:name="P22" style:parent-style-name="Listeavsnitt" style:family="paragraph"/>
    <style:style style:name="P23" style:parent-style-name="Normal" style:family="paragraph">
      <style:text-properties fo:font-weight="bold" style:font-weight-asian="bold" style:font-weight-complex="bold"/>
    </style:style>
    <style:style style:name="T24" style:parent-style-name="Standardskriftforavsnit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Standardskriftforavsnit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T34" style:parent-style-name="Standardskriftforavsnitt" style:family="text">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T36" style:parent-style-name="Standardskriftforavsnitt" style:family="text">
      <style:text-properties fo:font-weight="bold" style:font-weight-asian="bold" style:font-weight-complex="bold"/>
    </style:style>
    <style:style style:name="T37" style:parent-style-name="Standardskriftforavsnitt" style:family="text">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E-postadresse]</text:span></text:p></draw:text-box><svg:title/><svg:desc/></draw:frame><draw:frame draw:z-index="251661312" draw:id="id4" draw:style-name="a5" draw:name="Tekstboks 153" text:anchor-type="paragraph" svg:x="0.24375in" svg:y="8.18542in" svg:width="7.78056in" svg:height="0.75278in" style:rel-width="scale" style:rel-height="scale"><draw:text-box><text:p text:style-name="P6">Sammendrag</text:p><text:p text:style-name="P7"><text:span text:style-name="T8">[Få leserens oppmerksomhet med et engasjerende utdrag. Det er vanligvis et kort sammendrag av dokumentet.<text:s/></text:span><text:span text:style-name="T9"><text:line-break/>Når du er klar til å legge til innhold, klikker du her og begynner å skrive.]</text:span></text:p></draw:text-box><svg:title/><svg:desc/></draw:frame><draw:frame draw:z-index="251659264" draw:id="id5" draw:style-name="a6" draw:name="Tekstboks 154" text:anchor-type="paragraph" svg:x="0.24375in" svg:y="3.50764in" svg:width="7.78056in" svg:height="4.2375in" style:rel-width="scale" style:rel-height="scale"><draw:text-box><text:p text:style-name="P10"><text:span text:style-name="T11">[Dokumenttittel]</text:span></text:p><text:p text:style-name="P12"><text:span text:style-name="T13">[Dokumentundertittel]</text:span></text:p></draw:text-box><svg:title/><svg:desc/></draw:frame></text:p>
      <text:p text:style-name="P14"/>
      <text:h text:style-name="Overskriftforinnholdsfortegnelse" text:outline-level="1"><text:bookmark-start text:name="_Toc97626475"/>Innhold<text:bookmark-end text:name="_Toc97626475"/></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97626475" office:target-frame-name="_top" xlink:show="replace"><text:span text:style-name="Hyperkobling">Innhold</text:span><text:tab/>1</text:a></text:p>
          <text:p text:style-name="P16"><text:a xlink:href="#_Toc97626476" office:target-frame-name="_top" xlink:show="replace"><text:span text:style-name="Hyperkobling">Konsept</text:span><text:tab/>1</text:a></text:p>
          <text:p text:style-name="P17"><text:a xlink:href="#_Toc97626477" office:target-frame-name="_top" xlink:show="replace"><text:span text:style-name="Hyperkobling">Oppgave</text:span><text:tab/>2</text:a></text:p>
          <text:p text:style-name="P18"><text:a xlink:href="#_Toc97626478" office:target-frame-name="_top" xlink:show="replace"><text:span text:style-name="Hyperkobling">Oppsett</text:span><text:tab/>2</text:a></text:p>
          <text:p text:style-name="P19"><text:a xlink:href="#_Toc97626479" office:target-frame-name="_top" xlink:show="replace"><text:span text:style-name="Hyperkobling">Header og landingsside</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Overskrift1" text:outline-level="1"><text:bookmark-start text:name="_Toc97538500"/><text:bookmark-start text:name="_Toc97626476"/></text:h>
      <text:soft-page-break/>
      <text:h text:style-name="Overskrift1" text:outline-level="1">Konsept<text:bookmark-end text:name="_Toc97538500"/><text:bookmark-end text:name="_Toc97626476"/></text:h>
      <text:p text:style-name="Ingenmellomrom">Jeg driver en fanpage for klubbene jeg supporter, og da kom jeg opp med ideèn om å lage en nettside for den også, i tillegg til instagram brukeren jeg styrer. Dette gir en ny plattform å ha fanpagen på, og vil gi mine følgere bredere muligheter til å følge fanpagen.</text:p>
      <text:h text:style-name="Overskrift1" text:outline-level="1"/>
      <text:h text:style-name="Overskrift1" text:outline-level="1"><text:bookmark-start text:name="_Toc97538501"/><text:bookmark-start text:name="_Toc97626477"/>Oppgave<text:bookmark-end text:name="_Toc97538501"/><text:bookmark-end text:name="_Toc97626477"/></text:h>
      <text:p text:style-name="Ingenmellomrom">Jeg skal lage en nettside som er bygget på react, som vil inneholde informasjon om klubbene og fanpagen, hvor jeg deler info om overganger, nyheter om klubbene, kamper, og med mer.</text:p>
      <text:h text:style-name="Overskrift1" text:outline-level="1"/>
      <text:h text:style-name="Overskrift1" text:outline-level="1"><text:bookmark-start text:name="_Toc97538502"/><text:bookmark-start text:name="_Toc97626478"/>Oppsett<text:bookmark-end text:name="_Toc97538502"/><text:bookmark-end text:name="_Toc97626478"/></text:h>
      <text:p text:style-name="Normal">Det første jeg gjør er å lage repositoryen, inne på nettversjonen av git-hub brukeren min. Jeg kloner prosjektet i github desktop og åpner prosjektet:</text:p>
      <text:p text:style-name="Normal"><draw:frame draw:style-name="a7" draw:name="Bilde 1" text:anchor-type="as-char" svg:x="0in" svg:y="0in" svg:width="5.36041in" svg:height="3.65928in" style:rel-width="scale" style:rel-height="scale"><draw:image xlink:href="media/image1.png" xlink:type="simple" xlink:show="embed" xlink:actuate="onLoad"/><svg:title/><svg:desc>Et bilde som inneholder tekst

Automatisk generert beskrivelse</svg:desc></draw:frame></text:p>
      <text:p text:style-name="Normal"/>
      <text:p text:style-name="Normal">Nå er jeg inne i prosjektet, og vil sette opp prosjektet som en react app:</text:p>
      <text:soft-page-break/>
      <text:p text:style-name="Normal"><draw:frame draw:style-name="a8" draw:name="Bilde 2" text:anchor-type="as-char" svg:x="0in" svg:y="0in" svg:width="6.3in" svg:height="3.54167in" style:rel-width="scale" style:rel-height="scale"><draw:image xlink:href="media/image2.png" xlink:type="simple" xlink:show="embed" xlink:actuate="onLoad"/><svg:title/><svg:desc>Et bilde som inneholder tekst

Automatisk generert beskrivelse</svg:desc></draw:frame></text:p>
      <text:p text:style-name="Normal">Jeg skriver «npx create-react-app hamkam-liverpool-fanpage», npx står for<text:s/><text:span text:style-name="T20">«Node package execute»<text:s/></text:span>og koden gjør at jeg lager react appen «hamkam-liverpool-fanpage», npx kommer med npm.<text:s/></text:p>
      <text:p text:style-name="Normal"/>
      <text:p text:style-name="Normal">Jeg starter prosjektet med denne koden:<text:s/></text:p>
      <text:list text:style-name="LFO1" text:continue-numbering="true">
        <text:list-item>
          <text:p text:style-name="P21">cd liverpool-hamkam-fanpage</text:p>
        </text:list-item>
        <text:list-item>
          <text:p text:style-name="P22">npm start</text:p>
        </text:list-item>
      </text:list>
      <text:p text:style-name="Normal"><draw:frame draw:style-name="a9" draw:name="Bilde 3" text:anchor-type="as-char" svg:x="0in" svg:y="0in" svg:width="6.3in" svg:height="3.54375in" style:rel-width="scale" style:rel-height="scale"><draw:image xlink:href="media/image3.png" xlink:type="simple" xlink:show="embed" xlink:actuate="onLoad"/><svg:title/><svg:desc>Et bilde som inneholder tekst

Automatisk generert beskrivelse</svg:desc></draw:frame></text:p>
      <text:p text:style-name="Normal"/>
      <text:p text:style-name="Normal"/>
      <text:soft-page-break/>
      <text:p text:style-name="Normal">Nå vil jeg få opp en webside med grunnleggende react:</text:p>
      <text:p text:style-name="Normal"><draw:frame draw:style-name="a10" draw:name="Bilde 4" text:anchor-type="as-char" svg:x="0in" svg:y="0in" svg:width="6.3in" svg:height="3.54375in" style:rel-width="scale" style:rel-height="scale"><draw:image xlink:href="media/image4.png" xlink:type="simple" xlink:show="embed" xlink:actuate="onLoad"/><svg:title/><svg:desc/></draw:frame>¨</text:p>
      <text:p text:style-name="Normal">Jeg fjerner unødvendig innhold, hvor jeg skal legge inn landingssiden min. Da renser jeg App.js, og app.css.<text:s/></text:p>
      <text:p text:style-name="Normal"/>
      <text:p text:style-name="Normal">Nå har jeg satt opp mappestrukturen, da kan jeg begynne å sette opp siden:</text:p>
      <text:p text:style-name="Normal"><draw:frame draw:style-name="a11" draw:name="Bilde 11" text:anchor-type="as-char" svg:x="0in" svg:y="0in" svg:width="6.3in" svg:height="3.54375in" style:rel-width="scale" style:rel-height="scale"><draw:image xlink:href="media/image5.png" xlink:type="simple" xlink:show="embed" xlink:actuate="onLoad"/><svg:title/><svg:desc>Et bilde som inneholder tekst

Automatisk generert beskrivelse</svg:desc></draw:frame></text:p>
      <text:p text:style-name="Normal"/>
      <text:p text:style-name="Normal"/>
      <text:h text:style-name="Overskrift1" text:outline-level="1"><text:bookmark-start text:name="_Toc97626479"/><text:soft-page-break/>Struktur</text:h>
      <text:p text:style-name="Normal"><draw:frame draw:style-name="a12" draw:name="Bilde 18" text:anchor-type="as-char" svg:x="0in" svg:y="0in" svg:width="6.3in" svg:height="5.67153in" style:rel-width="scale" style:rel-height="scale"><draw:image xlink:href="media/image6.png" xlink:type="simple" xlink:show="embed" xlink:actuate="onLoad"/><svg:title/><svg:desc>Et bilde som inneholder tekst

Automatisk generert beskrivelse</svg:desc></draw:frame></text:p>
      <text:p text:style-name="Normal">Jeg valgte å bruke en ganske basic struktur<text:s/>i koden min, også legger jeg til noen mapper for bedre struktur. Bilder legger jeg i assets, navigasjonsbar i components, og undersidene i pages. Stylingen til app og undrsider ligger i style, mens de andre appfilene som app.js,<text:s/><text:s/>.gitignore og package.json ligger i rout.</text:p>
      <text:h text:style-name="Overskrift1" text:outline-level="1"/>
      <text:h text:style-name="Overskrift1" text:outline-level="1">Header og landingsside<text:bookmark-end text:name="_Toc97626479"/></text:h>
      <text:p text:style-name="Normal"/>
      <text:p text:style-name="Normal">Når jeg skulle starte prosjektet måtte jeg fikse noen modules feil, som kom på grunn av react-router-dom, da skrev jeg inn denne koden i konsoll: «npm install -S react-router-dom» i konsollen.</text:p>
      <text:soft-page-break/>
      <text:p text:style-name="Normal"><draw:frame draw:style-name="a13" draw:name="Bilde 12" text:anchor-type="as-char" svg:x="0in" svg:y="0in" svg:width="6.3in" svg:height="3.39583in" style:rel-width="scale" style:rel-height="scale"><draw:image xlink:href="media/image7.png" xlink:type="simple" xlink:show="embed" xlink:actuate="onLoad"/><svg:title/><svg:desc>Et bilde som inneholder tekst

Automatisk generert beskrivelse</svg:desc></draw:frame></text:p>
      <text:p text:style-name="Normal"/>
      <text:p text:style-name="Normal">Det kom en del error i løpet av oppsettet av prosjektet, disse fikk jeg fikset med litt hjelp av Eirik. Jeg fant ut av at jeg hadde glemt å laste ned bootstrap, så det måtte gjøres. Da bruker jeg denne koden «npm install react-bootstrap<text:s/><text:a xlink:href="mailto:bootstrap@5.1.3" office:target-frame-name="_top" xlink:show="replace"><text:span text:style-name="Hyperkobling">bootstrap@5.1.3»</text:span></text:a><text:s/></text:p>
      <text:p text:style-name="Normal"/>
      <text:p text:style-name="Normal">Eksempler på koden ut etter å ha satt opp siden:</text:p>
      <text:p text:style-name="P23">Header.jsx:</text:p>
      <text:p text:style-name="Normal"><text:span text:style-name="T24"><draw:frame draw:style-name="a14" draw:name="Bilde 13" text:anchor-type="as-char" svg:x="0in" svg:y="0in" svg:width="6.3in" svg:height="2.87986in" style:rel-width="scale" style:rel-height="scale"><draw:image xlink:href="media/image8.png" xlink:type="simple" xlink:show="embed" xlink:actuate="onLoad"/><svg:title/><svg:desc>Et bilde som inneholder tekst

Automatisk generert beskrivelse</svg:desc></draw:frame></text:span></text:p>
      <text:p text:style-name="P25"/>
      <text:p text:style-name="P26"/>
      <text:p text:style-name="P27"/>
      <text:p text:style-name="P28"/>
      <text:soft-page-break/>
      <text:p text:style-name="P29">Home.jsx:</text:p>
      <text:p text:style-name="Normal"><text:span text:style-name="T30"><draw:frame draw:style-name="a15" draw:name="Bilde 14" text:anchor-type="as-char" svg:x="0in" svg:y="0in" svg:width="4.44854in" svg:height="2.29199in" style:rel-width="scale" style:rel-height="scale"><draw:image xlink:href="media/image9.png" xlink:type="simple" xlink:show="embed" xlink:actuate="onLoad"/><svg:title/><svg:desc>Et bilde som inneholder tekst

Automatisk generert beskrivelse</svg:desc></draw:frame></text:span></text:p>
      <text:p text:style-name="P31"/>
      <text:p text:style-name="P32"/>
      <text:p text:style-name="P33">App.css:</text:p>
      <text:p text:style-name="Normal"><text:span text:style-name="T34"><draw:frame draw:style-name="a16" draw:name="Bilde 15" text:anchor-type="as-char" svg:x="0in" svg:y="0in" svg:width="4.49496in" svg:height="2.30317in" style:rel-width="scale" style:rel-height="scale"><draw:image xlink:href="media/image10.png" xlink:type="simple" xlink:show="embed" xlink:actuate="onLoad"/><svg:title/><svg:desc>Et bilde som inneholder tekst

Automatisk generert beskrivelse</svg:desc></draw:frame></text:span></text:p>
      <text:p text:style-name="P35">App.js:</text:p>
      <text:p text:style-name="Normal"><text:span text:style-name="T36"><text:s/></text:span><text:span text:style-name="T37"><draw:frame draw:style-name="a17" draw:name="Bilde 16" text:anchor-type="as-char" svg:x="0in" svg:y="0in" svg:width="4.25959in" svg:height="3.42903in" style:rel-width="scale" style:rel-height="scale"><draw:image xlink:href="media/image11.png" xlink:type="simple" xlink:show="embed" xlink:actuate="onLoad"/><svg:title/><svg:desc>Et bilde som inneholder tekst

Automatisk generert beskrivelse</svg:desc></draw:frame></text:span></text:p>
      <text:p text:style-name="Normal"/>
      <text:p text:style-name="P38"/>
      <text:p text:style-name="P39"/>
      <text:p text:style-name="P40">Index.js:</text:p>
      <text:p text:style-name="Normal"><draw:frame draw:style-name="a18" draw:name="Bilde 17" text:anchor-type="as-char" svg:x="0in" svg:y="0in" svg:width="4.33394in" svg:height="2.7608in" style:rel-width="scale" style:rel-height="scale"><draw:image xlink:href="media/image12.png" xlink:type="simple" xlink:show="embed" xlink:actuate="onLoad"/><svg:title/><svg:desc>Et bilde som inneholder tekst, skjermbilde, skjerm

Automatisk generert beskrivelse</svg:desc></draw:frame></text:p>
      <text:p text:style-name="Normal"/>
      <text:h text:style-name="Overskrift1" text:outline-level="1">Undersider</text:h>
      <text:p text:style-name="Normal">Jeg begynte med Home og Om oss siden, hjem siden, altså landing siden ligner veldig på Instagram, i tillegg vil jeg legge på litt ekstra. Jeg endte opp med dette:</text:p>
      <text:p text:style-name="Normal"><draw:frame draw:style-name="a19" draw:name="Bilde 19" text:anchor-type="as-char" svg:x="0in" svg:y="0in" svg:width="6.3in" svg:height="3.17778in" style:rel-width="scale" style:rel-height="scale"><draw:image xlink:href="media/image13.png" xlink:type="simple" xlink:show="embed" xlink:actuate="onLoad"/><svg:title/><svg:desc/></draw:frame></text:p>
      <text:soft-page-break/>
      <text:p text:style-name="Normal"><draw:frame draw:style-name="a20" draw:name="Bilde 20" text:anchor-type="as-char" svg:x="0in" svg:y="0in" svg:width="6.3in" svg:height="3.17639in" style:rel-width="scale" style:rel-height="scale"><draw:image xlink:href="media/image14.png" xlink:type="simple" xlink:show="embed" xlink:actuate="onLoad"/><svg:title/><svg:desc>Et bilde som inneholder tekst

Automatisk generert beskrivels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Overskriftforinnholdsfortegnelse" style:display-name="Overskrift for innholdsfortegnelse" style:family="paragraph" style:parent-style-name="Overskrift1" style:next-style-name="Normal" style:default-outline-level="1">
      <style:paragraph-properties fo:keep-with-next="always" fo:keep-together="always" fo:margin-top="0.1666in" fo:margin-bottom="0in" fo:line-height="104%"/>
      <style:text-properties style:font-name="Calibri Light" fo:font-weight="normal" style:font-weight-asian="normal" style:font-weight-complex="normal" fo:color="#2F5496" style:letter-kerning="false" fo:font-size="16pt" style:font-size-asian="16pt" style:font-size-complex="16pt"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5.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dre Røste-Kise [Elev]</meta:initial-creator>
    <dc:creator>Sondre Røste Kise</dc:creator>
    <meta:creation-date>2022-03-14T08:29:00Z</meta:creation-date>
    <dc:date>2022-04-25T06:23:00Z</dc:date>
    <meta:template xlink:href="Normal" xlink:type="simple"/>
    <meta:editing-cycles>1</meta:editing-cycles>
    <meta:editing-duration>PT1197120S</meta:editing-duration>
    <meta:document-statistic meta:page-count="10" meta:paragraph-count="5" meta:word-count="419" meta:character-count="2640" meta:row-count="18" meta:non-whitespace-character-count="2226"/>
  </office:meta>
</office:document-meta>
</file>